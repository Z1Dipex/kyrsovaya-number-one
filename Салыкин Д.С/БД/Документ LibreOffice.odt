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top="0cm" fo:margin-bottom="0.499cm" style:contextual-spacing="false" style:line-height-at-least="0.503cm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This is an auto-generated Django model module.</text:p>
      <text:p text:style-name="P1"># You'll have to do the following manually to clean this up:</text:p>
      <text:p text:style-name="P1"># * Rearrange models' order</text:p>
      <text:p text:style-name="P1"># * Make sure each model has one field with primary_key=True</text:p>
      <text:p text:style-name="P1"># * Make sure each ForeignKey and OneToOneField has `on_delete` set to the desired behavior</text:p>
      <text:p text:style-name="P1"># * Remove `managed = False` lines if you wish to allow Django to create, modify, and delete the table</text:p>
      <text:p text:style-name="P1"># Feel free to rename the models, but don't rename db_table values or field names.</text:p>
      <text:p text:style-name="P2"><text:span text:style-name="T1">from</text:span> django.db <text:span text:style-name="T1">import</text:span> models</text:p>
      <text:p text:style-name="P3"/>
      <text:p text:style-name="P2"><text:span text:style-name="T2">class</text:span> <text:span text:style-name="T3">Document</text:span>(<text:span text:style-name="T3">models</text:span>.<text:span text:style-name="T3">Model</text:span>):</text:p>
      <text:p text:style-name="P2">name <text:span text:style-name="T4">=</text:span> models.TextField()</text:p>
      <text:p text:style-name="P4"/>
      <text:p text:style-name="P2"><text:span text:style-name="T2">class</text:span> <text:span text:style-name="T3">Meta</text:span>:</text:p>
      <text:p text:style-name="P2">managed <text:span text:style-name="T4">=</text:span> <text:span text:style-name="T2">False</text:span></text:p>
      <text:p text:style-name="P2">db_table <text:span text:style-name="T4">=</text:span> <text:span text:style-name="T5">'document'</text:span></text:p>
      <text:p text:style-name="P5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1:03.487222067</meta:creation-date>
    <meta:generator>LibreOffice/24.8.4.1$Linux_X86_64 LibreOffice_project/480$Build-1</meta:generator>
    <dc:date>2026-03-16T11:27:03.289167141</dc:date>
    <meta:editing-duration>PT1M30S</meta:editing-duration>
    <meta:editing-cycles>1</meta:editing-cycles>
    <meta:document-statistic meta:table-count="0" meta:image-count="0" meta:object-count="0" meta:page-count="1" meta:paragraph-count="13" meta:word-count="103" meta:character-count="599" meta:non-whitespace-character-count="509"/>
  </office:meta>
</office:document-meta>
</file>