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cum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итульный лис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невни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empora LGC Uni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.00.0000</text:date>, <text:time style:data-style-name="N2" text:time-value="10:27:50.83211436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2:16.729309646</meta:creation-date>
    <meta:generator>LibreOffice/24.8.4.1$Linux_X86_64 LibreOffice_project/480$Build-1</meta:generator>
    <dc:date>2026-03-16T10:31:52.740386429</dc:date>
    <meta:editing-duration>PT4M2S</meta:editing-duration>
    <meta:editing-cycles>1</meta:editing-cycles>
    <meta:document-statistic meta:table-count="2" meta:cell-count="7" meta:object-count="0"/>
  </office:meta>
</office:document-meta>
</file>